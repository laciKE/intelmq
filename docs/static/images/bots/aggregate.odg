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e994" draw:textarea-horizontal-align="justify" draw:textarea-vertical-align="middle" draw:auto-grow-height="false" fo:min-height="0.85cm" fo:min-width="6.3cm" loext:decorative="false"/>
      <style:paragraph-properties style:writing-mode="lr-tb"/>
    </style:style>
    <style:style style:name="gr2" style:family="graphic" style:parent-style-name="standard">
      <style:graphic-properties draw:fill="solid" draw:fill-color="#bf819e" draw:textarea-horizontal-align="justify" draw:textarea-vertical-align="middle" draw:auto-grow-height="false" fo:min-height="9.95cm" fo:min-width="4cm" loext:decorative="false"/>
      <style:paragraph-properties style:writing-mode="lr-tb"/>
    </style:style>
    <style:style style:name="gr3" style:family="graphic" style:parent-style-name="standard">
      <style:graphic-properties draw:fill="solid" draw:fill-color="#ffe994" draw:textarea-horizontal-align="justify" draw:textarea-vertical-align="middle" draw:auto-grow-height="false" fo:min-height="0.85cm" fo:min-width="7.8cm" loext:decorative="false"/>
      <style:paragraph-properties style:writing-mode="lr-tb"/>
    </style:style>
    <style:style style:name="gr4" style:family="graphic" style:parent-style-name="objectwithoutfill">
      <style:graphic-properties svg:stroke-width="0.159cm" svg:stroke-color="#111111" draw:marker-start="" draw:marker-start-width="0.538cm" draw:marker-end="Arrow" draw:marker-end-width="0.538cm" draw:fill="none" draw:textarea-vertical-align="middle" fo:padding-top="0.204cm" fo:padding-bottom="0.204cm" fo:padding-left="0.329cm" fo:padding-right="0.329cm" loext:decorative="false"/>
    </style:style>
    <style:style style:name="gr5" style:family="graphic" style:parent-style-name="objectwithoutfill">
      <style:graphic-properties svg:stroke-width="0.159cm" svg:stroke-color="#808080" draw:marker-start="" draw:marker-start-width="0.538cm" draw:marker-end="Arrow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svg:stroke-color="#000000" draw:marker-start="" draw:marker-start-width="0.538cm" draw:marker-end="Arrow" draw:marker-end-width="0.5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994"/>
      <style:paragraph-properties fo:text-align="center"/>
    </style:style>
    <style:style style:name="P3" style:family="paragraph">
      <loext:graphic-properties draw:fill="solid" draw:fill-color="#bf819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cm" svg:height="1.1cm" svg:x="0.3cm" svg:y="2.7cm">
          <text:p text:style-name="P1">Time 13:01<text:tab/>Data A B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8cm" svg:height="1.1cm" svg:x="0.3cm" svg:y="4.4cm">
          <text:p text:style-name="P1">Time 13:02<text:tab/>Data A C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8cm" svg:height="1.1cm" svg:x="0.3cm" svg:y="6.1cm">
          <text:p text:style-name="P1">Time 13:03<text:tab/>Data A B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8cm" svg:height="1.1cm" svg:x="0.3cm" svg:y="7.8cm">
          <text:p text:style-name="P1">Time 13:07<text:tab/>Data A 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0.2cm" svg:x="7.6cm" svg:y="1.1cm">
          <text:p text:style-name="P1">Aggreg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ime span:</text:p>
          <text:p text:style-name="P1">5 minutes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.8cm" svg:height="1.1cm" svg:x="12.6cm" svg:y="7.8cm">
          <text:p text:style-name="P1">Time 13:07<text:tab/>Data A B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8cm" svg:height="1.1cm" svg:x="12.6cm" svg:y="4.4cm">
          <text:p text:style-name="P1">Time 13:02<text:tab/>Data A C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8.3cm" svg:height="1.1cm" svg:x="12.6cm" svg:y="6.1cm">
          <text:p text:style-name="P1">Time 13:01-13:03<text:tab/>Data A B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7.1cm" svg:y1="3.25cm" svg:x2="12.6cm" svg:y2="6.65cm" draw:start-shape="id1" draw:start-glue-point="1" draw:end-shape="id2" draw:end-glue-point="3" svg:d="M7100 3250h501l4498 3400h501" svg:viewBox="0 0 5501 3401">
          <text:p/>
        </draw:connector>
        <draw:connector draw:style-name="gr5" draw:text-style-name="P4" draw:layer="layout" draw:type="lines" svg:x1="7.1cm" svg:y1="4.95cm" svg:x2="12.6cm" svg:y2="4.95cm" draw:start-shape="id3" draw:start-glue-point="1" draw:end-shape="id4" draw:end-glue-point="3" svg:d="M7100 4950h501 4498 501" svg:viewBox="0 0 5501 1">
          <text:p/>
        </draw:connector>
        <draw:connector draw:style-name="gr6" draw:text-style-name="P4" draw:layer="layout" draw:type="lines" svg:x1="7.1cm" svg:y1="6.65cm" svg:x2="12.6cm" svg:y2="6.65cm" draw:start-shape="id5" draw:start-glue-point="1" draw:end-shape="id2" draw:end-glue-point="3" svg:d="M7100 6650h501 4498 501" svg:viewBox="0 0 5501 1">
          <text:p/>
        </draw:connector>
        <draw:connector draw:style-name="gr5" draw:text-style-name="P4" draw:layer="layout" draw:type="lines" svg:x1="7.1cm" svg:y1="8.35cm" svg:x2="12.6cm" svg:y2="8.35cm" draw:start-shape="id6" draw:start-glue-point="1" draw:end-shape="id7" draw:end-glue-point="3" svg:d="M7100 8350h501 4498 501" svg:viewBox="0 0 55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Wagner</meta:initial-creator>
    <meta:creation-date>2025-05-05T12:51:14.986923388</meta:creation-date>
    <dc:date>2025-05-05T12:58:21.160959024</dc:date>
    <dc:creator>Sebastian Wagner</dc:creator>
    <meta:editing-duration>PT7M8S</meta:editing-duration>
    <meta:editing-cycles>1</meta:editing-cycles>
    <meta:document-statistic meta:object-count="12"/>
    <meta:generator>LibreOffice/25.2.2.2$Linux_X86_64 LibreOffice_project/520$Build-2</meta:generator>
  </office:meta>
</office:document-meta>
</file>